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116F868DACE.png" manifest:media-type="image/png"/>
  <manifest:file-entry manifest:full-path="Pictures/10000000000000D8000000B111E22F68.png" manifest:media-type="image/png"/>
  <manifest:file-entry manifest:full-path="Pictures/1000000000000500000002D091DB0C9B.png" manifest:media-type="image/png"/>
  <manifest:file-entry manifest:full-path="Pictures/1000000000000124000000971BF2EC62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10000063D0000031BFCAD9D9C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15" style:family="graphic" style:parent-style-name="standard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6" style:family="graphic" style:parent-style-name="standard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7" style:family="graphic" style:parent-style-name="standard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8" style:family="graphic" style:parent-style-name="standard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429cm" fo:min-width="0.553cm" loext:decorative="false"/>
    </style:style>
    <style:style style:name="gr20" style:family="graphic" style:parent-style-name="standard">
      <style:graphic-properties svg:stroke-color="#000000" draw:fill-color="#fafafa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fafafa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38cm" svg:height="1.517cm" svg:x="0.801cm" svg:y="0.762cm">
          <draw:text-box>
            <text:p><text:span text:style-name="T1">PAPYRUSPLANE</text:span></text:p>
          </draw:text-box>
        </draw:frame>
        <draw:frame draw:style-name="gr2" draw:text-style-name="P2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2" draw:text-style-name="P2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3" draw:text-style-name="P3" draw:layer="layout" svg:width="4.807cm" svg:height="0.962cm" svg:x="19.118cm" svg:y="1cm">
          <draw:text-box>
            <text:p>(19, 21, 22, 23)</text:p>
          </draw:text-box>
        </draw:frame>
        <draw:custom-shape draw:style-name="gr4" draw:text-style-name="P2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2" draw:text-style-name="P2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5" draw:text-style-name="P2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7" draw:text-style-name="P4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7" draw:text-style-name="P4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8">
          <draw:custom-shape draw:style-name="gr5" draw:text-style-name="P2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2" draw:text-style-name="P2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10" draw:id="id10" draw:layer="layout" svg:width="0.378cm" svg:height="0.321cm" svg:x="14.617cm" svg:y="2.5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9.135cm" svg:y1="6.363cm" svg:x2="14.995cm" svg:y2="2.74cm" draw:start-shape="id9" draw:start-glue-point="6" draw:end-shape="id10" draw:end-glue-point="10" svg:d="M19135 6363h-2070v-3623h-2070" svg:viewBox="0 0 4141 3624">
            <text:p/>
          </draw:connector>
          <draw:connector draw:style-name="gr7" draw:text-style-name="P4" draw:layer="layout" svg:x1="14.617cm" svg:y1="2.74cm" svg:x2="4.25cm" svg:y2="3.417cm" draw:start-shape="id10" draw:start-glue-point="6" draw:end-shape="id11" draw:end-glue-point="4" svg:d="M14617 2740h-10367v677" svg:viewBox="0 0 10368 678">
            <text:p/>
          </draw:connector>
          <draw:custom-shape draw:style-name="gr9" draw:text-style-name="P2" xml:id="id11" draw:id="id11" draw:layer="layout" svg:width="0.445cm" svg:height="0.444cm" svg:x="4.027cm" svg:y="3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10" draw:text-style-name="P2" xml:id="id12" draw:id="id12" draw:layer="layout" svg:width="0.378cm" svg:height="0.321cm" svg:x="2.492cm" svg:y="1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xml:id="id13" draw:id="id13" draw:layer="layout" svg:width="0.445cm" svg:height="0.444cm" svg:x="18.222cm" svg:y="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draw:line-skew="-0.668cm" svg:x1="2.492cm" svg:y1="16.931cm" svg:x2="18.222cm" svg:y2="2.234cm" draw:start-shape="id12" draw:start-glue-point="6" draw:end-shape="id13" draw:end-glue-point="6" svg:d="M2492 16931h-1248v-14697h16978" svg:viewBox="0 0 16979 14698">
            <text:p/>
          </draw:connector>
          <draw:custom-shape draw:style-name="gr6" draw:text-style-name="P2" xml:id="id14" draw:id="id14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19.148cm" svg:y1="7.129cm" svg:x2="18.445cm" svg:y2="2.456cm" draw:start-shape="id14" draw:start-glue-point="6" draw:end-shape="id13" draw:end-glue-point="8" svg:d="M19148 7129h-703v-4673" svg:viewBox="0 0 704 4674">
            <text:p/>
          </draw:connector>
        </draw:g>
        <draw:frame draw:style-name="gr13" draw:text-style-name="P3" draw:layer="layout" svg:width="4.807cm" svg:height="0.963cm" svg:x="23.75cm" svg:y="1cm">
          <draw:text-box>
            <text:p>(18; 23; 19 ;22)</text:p>
          </draw:text-box>
        </draw:frame>
        <draw:g draw:style-name="gr8">
          <draw:custom-shape draw:style-name="gr5" draw:text-style-name="P2" xml:id="id16" draw:id="id16" draw:layer="layout" svg:width="0.378cm" svg:height="0.321cm" svg:x="14.603cm" svg:y="7.1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5" draw:id="id15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5" draw:layer="layout" svg:x1="19.903cm" svg:y1="8.322cm" svg:x2="14.981cm" svg:y2="7.276cm" draw:start-shape="id15" draw:start-glue-point="6" draw:end-shape="id16" draw:end-glue-point="10" svg:d="M19903 8322h-2461v-1046h-2461" svg:viewBox="0 0 4923 1047">
            <text:p/>
          </draw:connector>
        </draw:g>
        <draw:g draw:style-name="gr8">
          <draw:custom-shape draw:style-name="gr5" draw:text-style-name="P2" xml:id="id18" draw:id="id18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7" draw:id="id17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4" draw:layer="layout" draw:line-skew="-1.442cm" svg:x1="19.985cm" svg:y1="10.416cm" svg:x2="15.234cm" svg:y2="8.922cm" draw:start-shape="id17" draw:start-glue-point="6" draw:end-shape="id18" draw:end-glue-point="10" svg:d="M19985 10416h-3817v-1494h-934" svg:viewBox="0 0 4752 1495">
            <text:p/>
          </draw:connector>
        </draw:g>
        <draw:g draw:style-name="gr8">
          <draw:custom-shape draw:style-name="gr5" draw:text-style-name="P2" xml:id="id20" draw:id="id20" draw:layer="layout" svg:width="0.378cm" svg:height="0.321cm" svg:x="14.727cm" svg:y="6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9" draw:id="id19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4" draw:layer="layout" draw:line-skew="-0.624cm" svg:x1="19.985cm" svg:y1="8.988cm" svg:x2="15.105cm" svg:y2="6.413cm" draw:start-shape="id19" draw:start-glue-point="6" draw:end-shape="id20" draw:end-glue-point="10" svg:d="M19985 8988h-3064v-2575h-1816" svg:viewBox="0 0 4881 2576">
            <text:p/>
          </draw:connector>
        </draw:g>
        <draw:g draw:style-name="gr8">
          <draw:custom-shape draw:style-name="gr5" draw:text-style-name="P2" xml:id="id22" draw:id="id22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1" draw:id="id21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6" draw:layer="layout" draw:line-skew="-1.122cm" svg:x1="20.035cm" svg:y1="9.677cm" svg:x2="15.055cm" svg:y2="8.132cm" draw:start-shape="id21" draw:start-glue-point="6" draw:end-shape="id22" draw:end-glue-point="10" svg:d="M20035 9677h-3612v-1545h-1368" svg:viewBox="0 0 4981 1546">
            <text:p/>
          </draw:connector>
        </draw:g>
        <draw:frame draw:style-name="gr2" draw:text-style-name="P2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  <draw:custom-shape draw:style-name="gr5" draw:text-style-name="P2" xml:id="id23" draw:id="id23" draw:layer="layout" svg:width="0.378cm" svg:height="0.321cm" svg:x="2.401cm" svg:y="4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4" draw:id="id24" draw:layer="layout" svg:width="0.445cm" svg:height="0.444cm" svg:x="4.93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2.59cm" svg:y1="4.215cm" svg:x2="4.939cm" svg:y2="3.622cm" draw:start-shape="id23" draw:start-glue-point="4" draw:end-shape="id24" draw:end-glue-point="6" svg:d="M2590 4215v-593h2349" svg:viewBox="0 0 2350 594">
          <text:p/>
        </draw:connector>
        <draw:custom-shape draw:style-name="gr9" draw:text-style-name="P2" xml:id="id25" draw:id="id25" draw:layer="layout" svg:width="0.564cm" svg:height="0.511cm" svg:x="7.612cm" svg:y="1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xml:id="id31" draw:id="id31" draw:layer="layout" svg:x1="7.612cm" svg:y1="18.96cm" svg:x2="5.162cm" svg:y2="3.844cm" draw:start-shape="id25" draw:start-glue-point="6" draw:end-shape="id24" draw:end-glue-point="8" svg:d="M7612 18960h-2450v-15116" svg:viewBox="0 0 2451 15117">
          <text:p/>
        </draw:connector>
        <draw:connector draw:style-name="gr11" draw:text-style-name="P4" draw:layer="layout" svg:x1="2.776cm" svg:y1="15.198cm" svg:x2="9.259cm" svg:y2="19.193cm" draw:start-shape="id26" draw:start-glue-point="8" draw:end-shape="id27" draw:end-glue-point="8" svg:d="M2776 15198v4575h6483v-580" svg:viewBox="0 0 6484 4576">
          <text:p/>
        </draw:connector>
        <draw:custom-shape draw:style-name="gr18" draw:text-style-name="P7" xml:id="id26" draw:id="id26" draw:layer="layout" svg:width="0.378cm" svg:height="0.321cm" svg:x="2.587cm" svg:y="14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27" draw:id="id27" draw:layer="layout" svg:width="0.378cm" svg:height="0.321cm" svg:x="9.07cm" svg:y="18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503cm" svg:height="1.072cm" draw:transform="rotate (-1.55334303427495) translate (24.389cm 18.246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.503cm" svg:height="1.072cm" draw:transform="rotate (-1.55334303427495) translate (27.155cm 18.161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714cm" svg:height="4.682cm" svg:x="21.077cm" svg:y="20.792cm">
          <draw:image xlink:href="Pictures/10000000000000D8000000B111E22F68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29" draw:id="id29" draw:layer="layout" svg:width="0.378cm" svg:height="0.321cm" svg:x="14.948cm" svg:y="10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8" draw:id="id28" draw:layer="layout" svg:width="0.163cm" svg:height="0.247cm" svg:x="21.047cm" svg:y="23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4" draw:layer="layout" draw:line-skew="0.187cm" svg:x1="21.047cm" svg:y1="23.643cm" svg:x2="15.326cm" svg:y2="10.548cm" draw:start-shape="id28" draw:start-glue-point="6" draw:end-shape="id29" draw:end-glue-point="10" svg:d="M21047 23643h-2673v-13095h-3048" svg:viewBox="0 0 5722 13096">
            <text:p/>
          </draw:connector>
        </draw:g>
        <draw:connector draw:style-name="gr12" draw:text-style-name="P4" draw:layer="layout" svg:x1="21.167cm" svg:y1="24.035cm" svg:x2="5.162cm" svg:y2="18.96cm" draw:start-shape="id30" draw:start-glue-point="5" draw:end-shape="id31" draw:end-glue-point="0" svg:d="M21167 24035h-16005v-5075" svg:viewBox="0 0 16006 5076">
          <text:p/>
        </draw:connector>
        <draw:custom-shape draw:style-name="gr20" draw:text-style-name="P8" xml:id="id30" draw:id="id30" draw:layer="layout" svg:width="0.529cm" svg:height="0.446cm" svg:x="21.167cm" svg:y="23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4" xml:id="id33" draw:id="id33" draw:layer="layout" svg:width="0.529cm" svg:height="0.446cm" svg:x="21.167cm" svg:y="24.3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svg:x1="3.388cm" svg:y1="20.103cm" svg:x2="21.167cm" svg:y2="24.536cm" draw:start-shape="id32" draw:start-glue-point="6" draw:end-shape="id33" draw:end-glue-point="5" svg:d="M3388 20103v4433h17779" svg:viewBox="0 0 17780 4434">
          <text:p/>
        </draw:connector>
        <draw:custom-shape draw:style-name="gr20" draw:text-style-name="P8" draw:layer="layout" svg:width="0.529cm" svg:height="0.446cm" svg:x="21.167cm" svg:y="24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8" xml:id="id32" draw:id="id32" draw:layer="layout" svg:width="0.529cm" svg:height="0.446cm" svg:x="3.123cm" svg:y="19.6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frame draw:style-name="gr2" draw:text-style-name="P2" draw:layer="layout" svg:width="10.291cm" svg:height="7.354cm" svg:x="3.507cm" svg:y="3.151cm">
          <draw:image xlink:href="Pictures/100000000000018500000116F868DACE.png" xlink:type="simple" xlink:show="embed" xlink:actuate="onLoad" draw:mime-type="image/png">
            <text:p/>
          </draw:image>
        </draw:frame>
        <draw:frame draw:style-name="gr2" draw:text-style-name="P2" draw:layer="layout" svg:width="24.304cm" svg:height="13.671cm" svg:x="15.699cm" svg:y="4.138cm">
          <draw:image xlink:href="Pictures/1000000000000500000002D091DB0C9B.png" xlink:type="simple" xlink:show="embed" xlink:actuate="onLoad" draw:mime-type="image/png">
            <text:p/>
          </draw:image>
        </draw:frame>
        <draw:frame draw:style-name="gr2" draw:text-style-name="P2" draw:layer="layout" svg:width="19.887cm" svg:height="9.899cm" svg:x="5.612cm" svg:y="16.834cm">
          <draw:image xlink:href="Pictures/100000010000063D0000031BFCAD9D9C.png" xlink:type="simple" xlink:show="embed" xlink:actuate="onLoad" draw:mime-type="image/png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5722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6-07-15T17:59:18.908603541</dc:date>
    <meta:editing-duration>PT9H13M25S</meta:editing-duration>
    <meta:editing-cycles>12</meta:editing-cycles>
    <meta:generator>LibreOffice/24.2.7.2$Linux_X86_64 LibreOffice_project/420$Build-2</meta:generator>
    <meta:document-statistic meta:object-count="75"/>
  </office:meta>
</office:document-meta>
</file>