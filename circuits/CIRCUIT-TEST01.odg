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116F868DACE.png" manifest:media-type="image/png"/>
  <manifest:file-entry manifest:full-path="Pictures/10000000000000D8000000B111E22F68.png" manifest:media-type="image/png"/>
  <manifest:file-entry manifest:full-path="Pictures/10000000000002330000020C696BFB95.png" manifest:media-type="image/png"/>
  <manifest:file-entry manifest:full-path="Pictures/10000000000001F8000002569074D4CB.png" manifest:media-type="image/png"/>
  <manifest:file-entry manifest:full-path="Pictures/1000000000000477000002499F5E11B9.png" manifest:media-type="image/png"/>
  <manifest:file-entry manifest:full-path="Pictures/1000000000000500000002D091DB0C9B.png" manifest:media-type="image/png"/>
  <manifest:file-entry manifest:full-path="Pictures/1000000000000124000000971BF2EC62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10000063D0000031BFCAD9D9C.png" manifest:media-type="image/png"/>
  <manifest:file-entry manifest:full-path="Pictures/10000000000001510000029A98580EB9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4.248cm" fo:min-width="21.98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16" style:family="graphic" style:parent-style-name="standard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7" style:family="graphic" style:parent-style-name="standard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8" style:family="graphic" style:parent-style-name="standard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429cm" fo:min-width="0.553cm" loext:decorative="false"/>
    </style:style>
    <style:style style:name="gr21" style:family="graphic" style:parent-style-name="standard">
      <style:graphic-properties draw:stroke="none" draw:fill="none" fo:min-height="2.552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4000" fo:min-height="5.39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gr24" style:family="graphic" style:parent-style-name="Default_20_Drawing_20_Style_5f_1">
      <style:graphic-properties draw:stroke="none" draw:fill="none" fo:min-height="2.533cm" loext:decorative="false"/>
      <style:paragraph-properties style:writing-mode="lr-tb"/>
    </style:style>
    <style:style style:name="gr25" style:family="graphic" style:parent-style-name="Default_20_Drawing_20_Style_5f_1">
      <style:graphic-properties draw:stroke="none" draw:fill="none" fo:min-height="0.975cm" loext:decorative="false"/>
      <style:paragraph-properties style:writing-mode="lr-tb"/>
    </style:style>
    <style:style style:name="gr26" style:family="graphic" style:parent-style-name="Default_20_Drawing_20_Style_5f_1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1.656cm" fo:min-width="0.924cm" fo:padding-top="0.204cm" fo:padding-bottom="0.204cm" fo:padding-left="0.329cm" fo:padding-right="0.329cm" loext:decorative="false"/>
    </style:style>
    <style:style style:name="gr27" style:family="graphic" style:parent-style-name="Default_20_Drawing_20_Style_5f_1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28" style:family="graphic" style:parent-style-name="Default_20_Drawing_20_Style_5f_1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29" style:family="graphic" style:parent-style-name="Default_20_Drawing_20_Style_5f_1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30" style:family="graphic" style:parent-style-name="Default_20_Drawing_20_Style_5f_1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31" style:family="graphic" style:parent-style-name="Default_20_Drawing_20_Style_5f_1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32" style:family="graphic" style:parent-style-name="Default_20_Drawing_20_Style_5f_1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33" style:family="graphic" style:parent-style-name="Default_20_Drawing_20_Style_5f_1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34" style:family="graphic" style:parent-style-name="Default_20_Drawing_20_Style_5f_1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35" style:family="graphic" style:parent-style-name="Default_20_Drawing_20_Style_5f_1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232cm" fo:min-width="2.517cm" fo:wrap-option="wrap" loext:decorative="false"/>
      <style:paragraph-properties style:writing-mode="lr-tb"/>
    </style:style>
    <style:style style:name="gr37" style:family="graphic" style:parent-style-name="Default_20_Drawing_20_Style_5f_1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38" style:family="graphic" style:parent-style-name="Default_20_Drawing_20_Style_5f_1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39" style:family="graphic" style:parent-style-name="Default_20_Drawing_20_Style_5f_1">
      <style:graphic-properties svg:stroke-color="#000000" draw:textarea-horizontal-align="justify" draw:textarea-vertical-align="middle" draw:auto-grow-height="false" fo:min-height="0.22cm" fo:min-width="0.222cm" loext:decorative="false"/>
    </style:style>
    <style:style style:name="gr40" style:family="graphic" style:parent-style-name="Default_20_Drawing_20_Style_5f_1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41" style:family="graphic" style:parent-style-name="Default_20_Drawing_20_Style_5f_1">
      <style:graphic-properties svg:stroke-color="#000000" draw:fill-color="#fafafa" draw:textarea-horizontal-align="justify" draw:textarea-vertical-align="middle" draw:auto-grow-height="false" fo:min-height="0cm" fo:min-width="0cm" loext:decorative="false"/>
    </style:style>
    <style:style style:name="gr42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00a933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 draw:fill-color="#ff4000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-color="#00a933"/>
      <style:paragraph-properties fo:text-align="center" style:writing-mode="lr-tb"/>
    </style:style>
    <style:style style:name="P16" style:family="paragraph">
      <loext:graphic-properties draw:fill="none"/>
      <style:text-properties fo:font-size="21.8999996185303pt" style:font-size-asian="32pt" style:font-size-complex="32pt"/>
    </style:style>
    <style:style style:name="P17" style:family="paragraph">
      <loext:graphic-properties draw:fill="none"/>
      <style:text-properties fo:font-size="12.3000001907349pt"/>
    </style:style>
    <style:style style:name="P18" style:family="paragraph">
      <loext:graphic-properties draw:fill-color="#fafafa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.3000001907349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89cm" svg:height="4.498cm" svg:x="3.747cm" svg:y="4.806cm">
          <text:p text:style-name="P1"><text:span text:style-name="T1">202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3" draw:layer="layout" svg:width="10.938cm" svg:height="1.517cm" svg:x="0.801cm" svg:y="0.762cm">
          <draw:text-box>
            <text:p><text:span text:style-name="T2">PAPYRUSPLANE</text:span></text:p>
          </draw:text-box>
        </draw:frame>
        <draw:frame draw:style-name="gr3" draw:text-style-name="P4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3" draw:text-style-name="P4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4" draw:text-style-name="P5" draw:layer="layout" svg:width="4.807cm" svg:height="0.962cm" svg:x="19.118cm" svg:y="1cm">
          <draw:text-box>
            <text:p>(19, 21, 22, 23)</text:p>
          </draw:text-box>
        </draw:frame>
        <draw:custom-shape draw:style-name="gr5" draw:text-style-name="P4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3" draw:text-style-name="P4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6" draw:text-style-name="P4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8" draw:text-style-name="P6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8" draw:text-style-name="P6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9">
          <draw:custom-shape draw:style-name="gr6" draw:text-style-name="P4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6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3" draw:text-style-name="P4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9">
          <draw:custom-shape draw:style-name="gr6" draw:text-style-name="P4" xml:id="id10" draw:id="id10" draw:layer="layout" svg:width="0.378cm" svg:height="0.321cm" svg:x="14.617cm" svg:y="2.5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6" draw:layer="layout" svg:x1="19.135cm" svg:y1="6.363cm" svg:x2="14.995cm" svg:y2="2.74cm" draw:start-shape="id9" draw:start-glue-point="6" draw:end-shape="id10" draw:end-glue-point="10" svg:d="M19135 6363h-2070v-3623h-2070" svg:viewBox="0 0 4141 3624">
            <text:p/>
          </draw:connector>
          <draw:connector draw:style-name="gr8" draw:text-style-name="P6" draw:layer="layout" svg:x1="14.617cm" svg:y1="2.74cm" svg:x2="4.25cm" svg:y2="3.417cm" draw:start-shape="id10" draw:start-glue-point="6" draw:end-shape="id11" draw:end-glue-point="4" svg:d="M14617 2740h-10367v677" svg:viewBox="0 0 10368 678">
            <text:p/>
          </draw:connector>
          <draw:custom-shape draw:style-name="gr10" draw:text-style-name="P4" xml:id="id11" draw:id="id11" draw:layer="layout" svg:width="0.445cm" svg:height="0.444cm" svg:x="4.027cm" svg:y="3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ustom-shape draw:style-name="gr11" draw:text-style-name="P4" xml:id="id12" draw:id="id12" draw:layer="layout" svg:width="0.378cm" svg:height="0.321cm" svg:x="2.492cm" svg:y="1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xml:id="id13" draw:id="id13" draw:layer="layout" svg:width="0.445cm" svg:height="0.444cm" svg:x="18.222cm" svg:y="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6" draw:layer="layout" draw:line-skew="-0.668cm" svg:x1="2.492cm" svg:y1="16.931cm" svg:x2="18.222cm" svg:y2="2.234cm" draw:start-shape="id12" draw:start-glue-point="6" draw:end-shape="id13" draw:end-glue-point="6" svg:d="M2492 16931h-1248v-14697h16978" svg:viewBox="0 0 16979 14698">
            <text:p/>
          </draw:connector>
          <draw:custom-shape draw:style-name="gr7" draw:text-style-name="P4" xml:id="id14" draw:id="id14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19.148cm" svg:y1="7.129cm" svg:x2="18.445cm" svg:y2="2.456cm" draw:start-shape="id14" draw:start-glue-point="6" draw:end-shape="id13" draw:end-glue-point="8" svg:d="M19148 7129h-703v-4673" svg:viewBox="0 0 704 4674">
            <text:p/>
          </draw:connector>
        </draw:g>
        <draw:frame draw:style-name="gr14" draw:text-style-name="P5" draw:layer="layout" svg:width="4.807cm" svg:height="0.963cm" svg:x="23.75cm" svg:y="1cm">
          <draw:text-box>
            <text:p>(18; 23; 19 ;22)</text:p>
          </draw:text-box>
        </draw:frame>
        <draw:g draw:style-name="gr9">
          <draw:custom-shape draw:style-name="gr6" draw:text-style-name="P4" xml:id="id16" draw:id="id16" draw:layer="layout" svg:width="0.378cm" svg:height="0.321cm" svg:x="14.603cm" svg:y="7.1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5" draw:id="id15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7" draw:layer="layout" svg:x1="19.903cm" svg:y1="8.322cm" svg:x2="14.981cm" svg:y2="7.276cm" draw:start-shape="id15" draw:start-glue-point="6" draw:end-shape="id16" draw:end-glue-point="10" svg:d="M19903 8322h-2461v-1046h-2461" svg:viewBox="0 0 4923 1047">
            <text:p/>
          </draw:connector>
        </draw:g>
        <draw:g draw:style-name="gr9">
          <draw:custom-shape draw:style-name="gr6" draw:text-style-name="P4" xml:id="id18" draw:id="id18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7" draw:id="id17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6" draw:layer="layout" draw:line-skew="-1.442cm" svg:x1="19.985cm" svg:y1="10.416cm" svg:x2="15.234cm" svg:y2="8.922cm" draw:start-shape="id17" draw:start-glue-point="6" draw:end-shape="id18" draw:end-glue-point="10" svg:d="M19985 10416h-3817v-1494h-934" svg:viewBox="0 0 4752 1495">
            <text:p/>
          </draw:connector>
        </draw:g>
        <draw:g draw:style-name="gr9">
          <draw:custom-shape draw:style-name="gr6" draw:text-style-name="P4" xml:id="id20" draw:id="id20" draw:layer="layout" svg:width="0.378cm" svg:height="0.321cm" svg:x="14.727cm" svg:y="6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9" draw:id="id19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6" draw:layer="layout" draw:line-skew="-0.624cm" svg:x1="19.985cm" svg:y1="8.988cm" svg:x2="15.105cm" svg:y2="6.413cm" draw:start-shape="id19" draw:start-glue-point="6" draw:end-shape="id20" draw:end-glue-point="10" svg:d="M19985 8988h-3064v-2575h-1816" svg:viewBox="0 0 4881 2576">
            <text:p/>
          </draw:connector>
        </draw:g>
        <draw:g draw:style-name="gr9">
          <draw:custom-shape draw:style-name="gr6" draw:text-style-name="P4" xml:id="id22" draw:id="id22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21" draw:id="id21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8" draw:layer="layout" draw:line-skew="-1.122cm" svg:x1="20.035cm" svg:y1="9.677cm" svg:x2="15.055cm" svg:y2="8.132cm" draw:start-shape="id21" draw:start-glue-point="6" draw:end-shape="id22" draw:end-glue-point="10" svg:d="M20035 9677h-3612v-1545h-1368" svg:viewBox="0 0 4981 1546">
            <text:p/>
          </draw:connector>
        </draw:g>
        <draw:frame draw:style-name="gr3" draw:text-style-name="P4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  <draw:g draw:style-name="gr9">
          <draw:custom-shape draw:style-name="gr6" draw:text-style-name="P4" xml:id="id23" draw:id="id23" draw:layer="layout" svg:width="0.378cm" svg:height="0.321cm" svg:x="2.401cm" svg:y="4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xml:id="id24" draw:id="id24" draw:layer="layout" svg:width="0.445cm" svg:height="0.444cm" svg:x="4.939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2.59cm" svg:y1="4.215cm" svg:x2="4.939cm" svg:y2="3.622cm" draw:start-shape="id23" draw:start-glue-point="4" draw:end-shape="id24" draw:end-glue-point="6" svg:d="M2590 4215v-593h2349" svg:viewBox="0 0 2350 594">
            <text:p/>
          </draw:connector>
          <draw:custom-shape draw:style-name="gr10" draw:text-style-name="P4" xml:id="id25" draw:id="id25" draw:layer="layout" svg:width="0.564cm" svg:height="0.511cm" svg:x="7.612cm" svg:y="18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7.612cm" svg:y1="18.96cm" svg:x2="5.162cm" svg:y2="3.844cm" draw:start-shape="id25" draw:start-glue-point="6" draw:end-shape="id24" draw:end-glue-point="8" svg:d="M7612 18960h-2450v-15116" svg:viewBox="0 0 2451 15117">
            <text:p/>
          </draw:connector>
          <draw:connector draw:style-name="gr13" draw:text-style-name="P6" draw:layer="layout" svg:x1="2.776cm" svg:y1="15.198cm" svg:x2="9.259cm" svg:y2="19.193cm" draw:start-shape="id26" draw:start-glue-point="8" draw:end-shape="id27" draw:end-glue-point="8" svg:d="M2776 15198v4575h6483v-580" svg:viewBox="0 0 6484 4576">
            <text:p/>
          </draw:connector>
          <draw:custom-shape draw:style-name="gr19" draw:text-style-name="P9" xml:id="id26" draw:id="id26" draw:layer="layout" svg:width="0.378cm" svg:height="0.321cm" svg:x="2.587cm" svg:y="14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9" xml:id="id27" draw:id="id27" draw:layer="layout" svg:width="0.378cm" svg:height="0.321cm" svg:x="9.07cm" svg:y="18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6" draw:layer="layout" svg:width="1.503cm" svg:height="1.072cm" draw:transform="rotate (-1.55334303427495) translate (24.389cm 18.246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1.503cm" svg:height="1.072cm" draw:transform="rotate (-1.55334303427495) translate (27.155cm 18.161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3" draw:text-style-name="P4" draw:layer="layout" svg:width="19.791cm" svg:height="10.128cm" svg:x="1.267cm" svg:y="3.488cm">
          <draw:image xlink:href="Pictures/1000000000000477000002499F5E11B9.png" xlink:type="simple" xlink:show="embed" xlink:actuate="onLoad" draw:mime-type="image/png">
            <text:p/>
          </draw:image>
        </draw:frame>
        <draw:frame draw:style-name="gr21" draw:text-style-name="P11" draw:layer="layout" svg:width="26.595cm" svg:height="2.802cm" svg:x="1.345cm" svg:y="1.337cm">
          <draw:text-box>
            <text:p text:style-name="P10"><text:span text:style-name="T3">SP32 Lite V1.0.0 Wifi Bluetooth Development Board Antenna ESP32 ESP-32 REV1 CH340G MicroPython 4MB Micro USB For Arduino</text:span></text:p>
            <text:p text:style-name="P10"><text:span text:style-name="T4"/></text:p>
          </draw:text-box>
        </draw:frame>
        <draw:frame draw:style-name="gr22" draw:text-style-name="P13" draw:layer="layout" svg:width="24.425cm" svg:height="5.647cm" svg:x="3.097cm" svg:y="14.47cm">
          <draw:text-box>
            <text:p text:style-name="P12"><text:span text:style-name="T4">On an ESP-32, you can use </text:span><text:span text:style-name="T5">PWM </text:span><text:span text:style-name="T4">on any GPIO pin that can be used as an output.</text:span></text:p>
            <text:p text:style-name="P12"><text:span text:style-name="T4">Do not use: GPIO 34–39 (input-only, so no PWM)</text:span></text:p>
            <text:p text:style-name="P12"><text:span text:style-name="T4">Use for PWM: GPIO 0–33 (all output-capable GPIOs can do PWM), but note a few “watch-outs”: </text:span></text:p>
            <text:p text:style-name="P12"><text:span text:style-name="T4">GPIO 6–11 are typically tied to the integrated SPI flash on many ESP32 modules (so avoid them for PWM on those modules/boards).</text:span></text:p>
            <text:p text:style-name="P12"><text:span text:style-name="T4">Boot/strap pins (like GPIO 0, 2, 5, 12, 15) can affect boot if they’re at the wrong level during reset—use caution if you attach LEDs/motors directly.</text:span></text:p>
            <text:p text:style-name="P12"><text:span text:style-name="T4">If you tell me the exact board/module name (e.g., “ESP-32 DevKit V1” vs a specific NodeMCU variant), I can list the safest PWM pins for that exact layout.</text:span></text:p>
            <text:p text:style-name="P12"><text:span text:style-name="T4"/></text:p>
          </draw:text-box>
        </draw:frame>
      </draw:page>
      <draw:page draw:name="page4" draw:style-name="dp1" draw:master-page-name="Default">
        <draw:frame draw:style-name="gr3" draw:text-style-name="P4" draw:layer="layout" svg:width="10.667cm" svg:height="12.657cm" svg:x="2.605cm" svg:y="3.992cm">
          <draw:image xlink:href="Pictures/10000000000001F8000002569074D4CB.png" xlink:type="simple" xlink:show="embed" xlink:actuate="onLoad" draw:mime-type="image/png">
            <text:p/>
          </draw:image>
        </draw:frame>
        <draw:frame draw:style-name="gr3" draw:text-style-name="P4" draw:layer="layout" svg:width="11.916cm" svg:height="11.09cm" svg:x="15.777cm" svg:y="5.175cm">
          <draw:image xlink:href="Pictures/10000000000002330000020C696BFB95.png" xlink:type="simple" xlink:show="embed" xlink:actuate="onLoad" draw:mime-type="image/png">
            <text:p/>
          </draw:image>
        </draw:frame>
        <draw:frame draw:style-name="gr23" draw:text-style-name="P14" draw:layer="layout" svg:width="20.302cm" svg:height="2.612cm" svg:x="5.069cm" svg:y="1.878cm">
          <draw:text-box>
            <text:p text:style-name="P10"><text:span text:style-name="T6">TZT DC Motor Drive Module For arduino Reversing PWM Speed Dual H Bridge Stepper Motor Mini Victory L298N</text:span></text:p>
          </draw:text-box>
        </draw:frame>
      </draw:page>
      <draw:page draw:name="page5" draw:style-name="dp1" draw:master-page-name="Default">
        <draw:frame draw:style-name="gr3" draw:text-style-name="P4" draw:layer="layout" svg:width="8.997cm" svg:height="17.782cm" svg:x="1cm" svg:y="1.778cm">
          <draw:image xlink:href="Pictures/10000000000001510000029A98580EB9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" draw:text-style-name="P15" draw:layer="layout" svg:width="22.489cm" svg:height="4.498cm" svg:x="3.747cm" svg:y="4.806cm">
          <text:p text:style-name="P6"><text:span text:style-name="T1">2026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24" draw:text-style-name="P16" draw:layer="layout" svg:width="11.572cm" svg:height="2.783cm" svg:x="1.304cm" svg:y="1.454cm">
          <draw:text-box>
            <text:p><text:span text:style-name="T2">PAPYRUSPLANE</text:span></text:p>
          </draw:text-box>
        </draw:frame>
        <draw:frame draw:style-name="gr3" draw:text-style-name="P4" draw:layer="layout" svg:width="4.347cm" svg:height="3.705cm" svg:x="20.091cm" svg:y="6.025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3" draw:text-style-name="P4" draw:layer="layout" svg:width="5.8cm" svg:height="11.368cm" svg:x="12.018cm" svg:y="4.4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25" draw:text-style-name="P17" draw:layer="layout" svg:width="3.329cm" svg:height="1.225cm" svg:x="20.337cm" svg:y="2.852cm">
          <draw:text-box>
            <text:p><text:span text:style-name="T7">(19, 21, 22, 23)</text:span></text:p>
          </draw:text-box>
        </draw:frame>
        <draw:custom-shape draw:style-name="gr26" draw:text-style-name="P4" draw:layer="layout" svg:width="1.582cm" svg:height="2.064cm" svg:x="16.261cm" svg:y="9.1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91cm" svg:height="2.27cm" draw:transform="skewX (-0.000523598775598299) rotate (-3.13705479753461) translate (24.528cm 14.352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3" draw:text-style-name="P4" draw:layer="layout" svg:width="1.91cm" svg:height="2.178cm" draw:transform="skewX (0.000523598775598298) rotate (-3.13688026460941) translate (26.414cm 14.259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27" draw:text-style-name="P4" xml:id="id31" draw:id="id31" draw:layer="layout" svg:width="0.279cm" svg:height="0.261cm" svg:x="23.631cm" svg:y="12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9" draw:id="id29" draw:layer="layout" svg:width="0.232cm" svg:height="0.249cm" svg:x="23.151cm" svg:y="12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33" draw:id="id33" draw:layer="layout" svg:width="0.247cm" svg:height="0.247cm" svg:x="25.05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32" draw:id="id32" draw:layer="layout" svg:width="0.308cm" svg:height="0.304cm" svg:x="23.29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30" draw:id="id30" draw:layer="layout" svg:width="0.308cm" svg:height="0.304cm" svg:x="23.347cm" svg:y="8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28" draw:id="id28" draw:layer="layout" svg:width="0.308cm" svg:height="0.304cm" svg:x="23.36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6" draw:layer="layout" svg:x1="23.671cm" svg:y1="9.279cm" svg:x2="23.267cm" svg:y2="12.059cm" draw:start-shape="id28" draw:start-glue-point="10" draw:end-shape="id29" draw:end-glue-point="4" svg:d="M23671 9279h581v1466h-985v1314" svg:viewBox="0 0 986 2781">
          <text:p/>
        </draw:connector>
        <draw:connector draw:style-name="gr29" draw:text-style-name="P6" draw:layer="layout" draw:line-skew="0.934cm 0.893cm" svg:x1="23.655cm" svg:y1="8.828cm" svg:x2="23.771cm" svg:y2="12.039cm" draw:start-shape="id30" draw:start-glue-point="10" draw:end-shape="id31" draw:end-glue-point="4" svg:d="M23655 8828h1515v2575h-1399v636" svg:viewBox="0 0 1516 3212">
          <text:p/>
        </draw:connector>
        <draw:connector draw:style-name="gr29" draw:text-style-name="P6" draw:layer="layout" svg:x1="23.599cm" svg:y1="8.28cm" svg:x2="25.18cm" svg:y2="12.074cm" draw:start-shape="id32" draw:start-glue-point="10" draw:end-shape="id33" draw:end-glue-point="4" svg:d="M23599 8280h1581v3794" svg:viewBox="0 0 1582 3795">
          <text:p/>
        </draw:connector>
        <draw:g draw:style-name="gr9">
          <draw:custom-shape draw:style-name="gr27" draw:text-style-name="P4" xml:id="id35" draw:id="id35" draw:layer="layout" svg:width="0.262cm" svg:height="0.22cm" svg:x="25.525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34" draw:id="id34" draw:layer="layout" svg:width="0.308cm" svg:height="0.304cm" svg:x="23.315cm" svg:y="7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6" draw:layer="layout" svg:x1="23.623cm" svg:y1="7.811cm" svg:x2="25.656cm" svg:y2="12.065cm" draw:start-shape="id34" draw:start-glue-point="10" draw:end-shape="id35" draw:end-glue-point="4" svg:d="M23623 7811h2033v4254" svg:viewBox="0 0 2034 4255">
            <text:p/>
          </draw:connector>
        </draw:g>
        <draw:frame draw:style-name="gr3" draw:text-style-name="P4" draw:layer="layout" svg:width="2.147cm" svg:height="7.411cm" svg:x="8.245cm" svg:y="5.141cm">
          <draw:image xlink:href="Pictures/100000000000003C000000D1623B6447.png" xlink:type="simple" xlink:show="embed" xlink:actuate="onLoad" draw:mime-type="image/png">
            <text:p/>
          </draw:image>
        </draw:frame>
        <draw:g draw:style-name="gr9">
          <draw:custom-shape draw:style-name="gr27" draw:text-style-name="P4" xml:id="id37" draw:id="id37" draw:layer="layout" svg:width="0.261cm" svg:height="0.22cm" svg:x="17.221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xml:id="id36" draw:id="id36" draw:layer="layout" svg:width="0.309cm" svg:height="0.304cm" svg:x="20.349cm" svg:y="6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6" draw:layer="layout" svg:x1="20.349cm" svg:y1="6.53cm" svg:x2="17.482cm" svg:y2="4.045cm" draw:start-shape="id36" draw:start-glue-point="6" draw:end-shape="id37" draw:end-glue-point="10" svg:d="M20349 6530h-1434v-2485h-1433" svg:viewBox="0 0 2868 2486">
            <text:p/>
          </draw:connector>
          <draw:connector draw:style-name="gr29" draw:text-style-name="P6" draw:layer="layout" svg:x1="17.221cm" svg:y1="4.045cm" svg:x2="10.041cm" svg:y2="4.509cm" draw:start-shape="id37" draw:start-glue-point="6" draw:end-shape="id38" draw:end-glue-point="4" svg:d="M17221 4045h-3513v-117h-3667v581" svg:viewBox="0 0 7181 582">
            <text:p/>
          </draw:connector>
          <draw:custom-shape draw:style-name="gr30" draw:text-style-name="P4" xml:id="id38" draw:id="id38" draw:layer="layout" svg:width="0.308cm" svg:height="0.305cm" svg:x="9.887cm" svg:y="4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ustom-shape draw:style-name="gr31" draw:text-style-name="P4" xml:id="id39" draw:id="id39" draw:layer="layout" svg:width="0.261cm" svg:height="0.22cm" svg:x="8.824cm" svg:y="13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4" xml:id="id40" draw:id="id40" draw:layer="layout" svg:width="0.308cm" svg:height="0.304cm" svg:x="19.717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6" draw:layer="layout" draw:line-skew="-0.668cm" svg:x1="8.824cm" svg:y1="13.779cm" svg:x2="19.717cm" svg:y2="3.698cm" draw:start-shape="id39" draw:start-glue-point="6" draw:end-shape="id40" draw:end-glue-point="6" svg:d="M8824 13779h-1249v-10081h12142" svg:viewBox="0 0 12143 10082">
            <text:p/>
          </draw:connector>
          <draw:custom-shape draw:style-name="gr28" draw:text-style-name="P4" xml:id="id41" draw:id="id41" draw:layer="layout" svg:width="0.308cm" svg:height="0.305cm" svg:x="20.358cm" svg:y="6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6" draw:layer="layout" svg:x1="20.358cm" svg:y1="7.056cm" svg:x2="19.871cm" svg:y2="3.85cm" draw:start-shape="id41" draw:start-glue-point="6" draw:end-shape="id40" draw:end-glue-point="8" svg:d="M20358 7056h-580v-1679h93v-1527" svg:viewBox="0 0 581 3207">
            <text:p/>
          </draw:connector>
        </draw:g>
        <draw:frame draw:style-name="gr25" draw:text-style-name="P17" draw:layer="layout" svg:width="3.329cm" svg:height="1.225cm" svg:x="23.545cm" svg:y="2.852cm">
          <draw:text-box>
            <text:p><text:span text:style-name="T7">(18; 23; 19 ;22)</text:span></text:p>
          </draw:text-box>
        </draw:frame>
        <draw:g draw:style-name="gr9">
          <draw:custom-shape draw:style-name="gr27" draw:text-style-name="P4" xml:id="id43" draw:id="id43" draw:layer="layout" svg:width="0.262cm" svg:height="0.22cm" svg:x="17.21cm" svg:y="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2" draw:id="id42" draw:layer="layout" svg:width="0.308cm" svg:height="0.305cm" svg:x="20.881cm" svg:y="7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7" draw:layer="layout" svg:x1="20.881cm" svg:y1="7.874cm" svg:x2="17.472cm" svg:y2="7.156cm" draw:start-shape="id42" draw:start-glue-point="6" draw:end-shape="id43" draw:end-glue-point="10" svg:d="M20881 7874h-1704v-718h-1705" svg:viewBox="0 0 3410 719">
            <text:p/>
          </draw:connector>
        </draw:g>
        <draw:g draw:style-name="gr9">
          <draw:custom-shape draw:style-name="gr27" draw:text-style-name="P4" xml:id="id45" draw:id="id45" draw:layer="layout" svg:width="0.262cm" svg:height="0.22cm" svg:x="17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4" draw:id="id44" draw:layer="layout" svg:width="0.308cm" svg:height="0.305cm" svg:x="20.938cm" svg:y="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5" draw:text-style-name="P6" draw:layer="layout" draw:line-skew="-0.77cm" svg:x1="20.938cm" svg:y1="8.331cm" svg:x2="17.476cm" svg:y2="12.732cm" draw:start-shape="id44" draw:start-glue-point="6" draw:end-shape="id45" draw:end-glue-point="10" svg:d="M20938 8331h-2500v4401h-962" svg:viewBox="0 0 3463 4402">
            <text:p/>
          </draw:connector>
          <draw:custom-shape draw:style-name="gr36" draw:text-style-name="P6" draw:layer="layout" svg:width="3.016cm" svg:height="1.481cm" svg:x="12.647cm" svg:y="1.957cm">
            <text:p text:style-name="P6"><text:span text:style-name="T8">Pin 22 did notwork with PWM</text:span></text:p>
            <draw:enhanced-geometry svg:viewBox="0 0 21600 21600" draw:glue-points="10800 0 0 10800 10800 21600 21600 10800 ?f40 ?f41" draw:text-areas="0 0 21600 21600" draw:type="rectangular-callout" draw:modifiers="33212.5952933378 68662.3481781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style-name="gr9">
          <draw:custom-shape draw:style-name="gr27" draw:text-style-name="P4" xml:id="id47" draw:id="id47" draw:layer="layout" svg:width="0.262cm" svg:height="0.22cm" svg:x="17.261cm" svg:y="7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6" draw:id="id46" draw:layer="layout" svg:width="0.308cm" svg:height="0.305cm" svg:x="20.972cm" svg:y="8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7" draw:text-style-name="P8" draw:layer="layout" draw:line-skew="-1.122cm" svg:x1="20.972cm" svg:y1="8.803cm" svg:x2="17.523cm" svg:y2="7.743cm" draw:start-shape="id46" draw:start-glue-point="6" draw:end-shape="id47" draw:end-glue-point="10" svg:d="M20972 8803h-2846v-1060h-603" svg:viewBox="0 0 3450 1061">
            <text:p/>
          </draw:connector>
        </draw:g>
        <draw:frame draw:style-name="gr3" draw:text-style-name="P4" draw:layer="layout" svg:width="2.855cm" svg:height="1.462cm" svg:x="23.501cm" svg:y="4.317cm">
          <draw:image xlink:href="Pictures/1000000000000124000000971BF2EC62.png" xlink:type="simple" xlink:show="embed" xlink:actuate="onLoad" draw:mime-type="image/png">
            <text:p/>
          </draw:image>
        </draw:frame>
        <draw:custom-shape draw:style-name="gr27" draw:text-style-name="P4" xml:id="id48" draw:id="id48" draw:layer="layout" svg:width="0.262cm" svg:height="0.22cm" svg:x="8.76cm" svg:y="5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49" draw:id="id49" draw:layer="layout" svg:width="0.308cm" svg:height="0.304cm" svg:x="10.518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6" draw:layer="layout" svg:x1="8.891cm" svg:y1="5.057cm" svg:x2="10.518cm" svg:y2="4.65cm" draw:start-shape="id48" draw:start-glue-point="4" draw:end-shape="id49" draw:end-glue-point="6" svg:d="M8891 5057v-580h880v173h747" svg:viewBox="0 0 1628 581">
          <text:p/>
        </draw:connector>
        <draw:custom-shape draw:style-name="gr30" draw:text-style-name="P4" xml:id="id50" draw:id="id50" draw:layer="layout" svg:width="0.391cm" svg:height="0.35cm" svg:x="12.369cm" svg:y="14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6" xml:id="id56" draw:id="id56" draw:layer="layout" svg:x1="12.369cm" svg:y1="15.17cm" svg:x2="10.672cm" svg:y2="4.802cm" draw:start-shape="id50" draw:start-glue-point="6" draw:end-shape="id49" draw:end-glue-point="8" svg:d="M12369 15170h-1697v-10368" svg:viewBox="0 0 1698 10369">
          <text:p/>
        </draw:connector>
        <draw:connector draw:style-name="gr32" draw:text-style-name="P6" draw:layer="layout" svg:x1="9.02cm" svg:y1="12.59cm" svg:x2="13.51cm" svg:y2="15.331cm" draw:start-shape="id51" draw:start-glue-point="8" draw:end-shape="id52" draw:end-glue-point="8" svg:d="M9020 12590v3322h4490v-581" svg:viewBox="0 0 4491 3323">
          <text:p/>
        </draw:connector>
        <draw:custom-shape draw:style-name="gr38" draw:text-style-name="P9" xml:id="id51" draw:id="id51" draw:layer="layout" svg:width="0.262cm" svg:height="0.22cm" svg:x="8.889cm" svg:y="12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xml:id="id52" draw:id="id52" draw:layer="layout" svg:width="0.262cm" svg:height="0.22cm" svg:x="13.379cm" svg:y="1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1.03cm" svg:height="0.742cm" draw:transform="rotate (-1.55334303427495) translate (23.987cm 14.681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" draw:layer="layout" svg:width="1.03cm" svg:height="0.742cm" draw:transform="rotate (-1.55334303427495) translate (25.902cm 14.623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957cm" svg:height="3.211cm" svg:x="21.694cm" svg:y="16.427cm">
          <draw:image xlink:href="Pictures/10000000000000D8000000B111E22F68.png" xlink:type="simple" xlink:show="embed" xlink:actuate="onLoad" draw:mime-type="image/png">
            <text:p/>
          </draw:image>
        </draw:frame>
        <draw:g draw:style-name="gr9">
          <draw:custom-shape draw:style-name="gr27" draw:text-style-name="P4" xml:id="id54" draw:id="id54" draw:layer="layout" svg:width="0.262cm" svg:height="0.22cm" svg:x="17.449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53" draw:id="id53" draw:layer="layout" svg:width="0.113cm" svg:height="0.169cm" svg:x="21.673cm" svg:y="18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6" draw:layer="layout" draw:line-skew="0.187cm" svg:x1="21.673cm" svg:y1="18.382cm" svg:x2="17.711cm" svg:y2="9.401cm" draw:start-shape="id53" draw:start-glue-point="6" draw:end-shape="id54" draw:end-glue-point="10" svg:d="M21673 18382h-1794v-8981h-2168" svg:viewBox="0 0 3963 8982">
            <text:p/>
          </draw:connector>
        </draw:g>
        <draw:connector draw:style-name="gr33" draw:text-style-name="P6" draw:layer="layout" svg:x1="21.756cm" svg:y1="18.652cm" svg:x2="10.672cm" svg:y2="15.17cm" draw:start-shape="id55" draw:start-glue-point="5" draw:end-shape="id56" draw:end-glue-point="0" svg:d="M21756 18652h-11084v-3482" svg:viewBox="0 0 11085 3483">
          <text:p/>
        </draw:connector>
        <draw:custom-shape draw:style-name="gr41" draw:text-style-name="P18" xml:id="id55" draw:id="id55" draw:layer="layout" svg:width="0.367cm" svg:height="0.306cm" svg:x="21.756cm" svg:y="18.4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58" draw:id="id58" draw:layer="layout" svg:width="0.367cm" svg:height="0.306cm" svg:x="21.756cm" svg:y="18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6" draw:layer="layout" svg:x1="9.444cm" svg:y1="15.955cm" svg:x2="21.756cm" svg:y2="18.996cm" draw:start-shape="id57" draw:start-glue-point="6" draw:end-shape="id58" draw:end-glue-point="5" svg:d="M9444 15955v3041h12312" svg:viewBox="0 0 12313 3042">
          <text:p/>
        </draw:connector>
        <draw:custom-shape draw:style-name="gr41" draw:text-style-name="P18" draw:layer="layout" svg:width="0.367cm" svg:height="0.306cm" svg:x="21.756cm" svg:y="18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8" xml:id="id57" draw:id="id57" draw:layer="layout" svg:width="0.367cm" svg:height="0.306cm" svg:x="9.26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9">
          <draw:custom-shape draw:style-name="gr27" draw:text-style-name="P4" xml:id="id60" draw:id="id60" draw:layer="layout" svg:width="0.262cm" svg:height="0.183cm" svg:x="17.331cm" svg:y="8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59" draw:id="id59" draw:layer="layout" svg:width="0.308cm" svg:height="0.254cm" svg:x="20.883cm" svg:y="9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6" draw:layer="layout" svg:x1="20.883cm" svg:y1="9.187cm" svg:x2="17.593cm" svg:y2="8.334cm" draw:start-shape="id59" draw:start-glue-point="6" draw:end-shape="id60" draw:end-glue-point="10" svg:d="M20883 9187h-1644v-853h-1646" svg:viewBox="0 0 3291 854">
            <text:p/>
          </draw:connector>
        </draw:g>
      </draw:page>
      <draw:page draw:name="page8" draw:style-name="dp1" draw:master-page-name="Default">
        <draw:frame draw:style-name="gr3" draw:text-style-name="P4" draw:layer="layout" svg:width="7.127cm" svg:height="5.044cm" svg:x="2.736cm" svg:y="2.475cm">
          <draw:image xlink:href="Pictures/100000000000018500000116F868DACE.png" xlink:type="simple" xlink:show="embed" xlink:actuate="onLoad" draw:mime-type="image/png">
            <text:p/>
          </draw:image>
        </draw:frame>
        <draw:frame draw:style-name="gr3" draw:text-style-name="P4" draw:layer="layout" svg:width="16.831cm" svg:height="9.377cm" svg:x="11.179cm" svg:y="3.152cm">
          <draw:image xlink:href="Pictures/1000000000000500000002D091DB0C9B.png" xlink:type="simple" xlink:show="embed" xlink:actuate="onLoad" draw:mime-type="image/png">
            <text:p/>
          </draw:image>
        </draw:frame>
        <draw:frame draw:style-name="gr3" draw:text-style-name="P4" draw:layer="layout" svg:width="13.772cm" svg:height="6.79cm" svg:x="4.193cm" svg:y="11.86cm">
          <draw:image xlink:href="Pictures/100000010000063D0000031BFCAD9D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ff5722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6-07-22T15:38:39.533929827</dc:date>
    <meta:editing-duration>PT6H44M54S</meta:editing-duration>
    <meta:editing-cycles>12</meta:editing-cycles>
    <meta:generator>LibreOffice/24.2.7.2$Linux_X86_64 LibreOffice_project/420$Build-2</meta:generator>
    <meta:document-statistic meta:object-count="147"/>
  </office:meta>
</office:document-meta>
</file>