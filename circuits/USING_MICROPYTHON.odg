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248cm" fo:min-width="21.989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 style:writing-mode="lr-tb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89cm" svg:height="4.498cm" svg:x="3.747cm" svg:y="4.806cm">
          <text:p text:style-name="P1"><text:span text:style-name="T1">2026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ff5722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6-07-23T17:20:02.737356400</dc:date>
    <meta:editing-duration>PT12H53M27S</meta:editing-duration>
    <meta:editing-cycles>13</meta:editing-cycles>
    <meta:generator>LibreOffice/24.2.7.2$Linux_X86_64 LibreOffice_project/420$Build-2</meta:generator>
    <meta:document-statistic meta:object-count="1"/>
  </office:meta>
</office:document-meta>
</file>